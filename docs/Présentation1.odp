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 style:parent-style-name="Graphics">
      <style:graphic-properties draw:fill="none" draw:stroke="none"/>
    </style:style>
    <style:style style:family="graphic" style:name="a573" style:parent-style-name="Graphics">
      <style:graphic-properties draw:fill="none" draw:stroke="non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drawing-page" style:name="a579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1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1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5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3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5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2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7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12" draw:master-page-name="Master1-Layout7-blank-Vide" presentation:presentation-page-layout-name="Master1-PPL7" draw:id="Slide-256">
        <draw:frame draw:id="id94" draw:style-name="a430" draw:name="ZoneTexte 1" svg:x="1.34906in" svg:y="1.83019in" svg:width="10.07547in" svg:height="2.55807in">
          <draw:text-box>
            <text:p text:style-name="a414" text:class-names="" text:cond-style-name=""><text:span text:style-name="a413" text:class-names=""><text:s text:c="39"/></text:span></text:p>
            <text:p text:style-name="a417" text:class-names="" text:cond-style-name=""><text:span text:style-name="a415" text:class-names=""><text:tab/><text:tab/><text:tab/></text:span><text:span text:style-name="a416" text:class-names="">PRESENTATION</text:span></text:p>
            <text:p text:style-name="a419" text:class-names="" text:cond-style-name=""><text:span text:style-name="a418" text:class-names=""/></text:p>
            <text:p text:style-name="a421" text:class-names="" text:cond-style-name=""><text:span text:style-name="a420" text:class-names=""/></text:p>
            <text:p text:style-name="a426" text:class-names="" text:cond-style-name=""><text:span text:style-name="a422" text:class-names=""><text:s text:c="5"/><text:tab/></text:span><text:span text:style-name="a423" text:class-names=""><text:s text:c="1"/></text:span><text:span text:style-name="a424" text:class-names=""><text:s text:c="7"/></text:span><text:span text:style-name="a425" text:class-names=""><text:s text:c="3"/>SAMBA-SYLLA-AFRITALENT<text:s text:c="1"/></text:span></text:p>
            <text:p text:style-name="a429" text:class-names="" text:cond-style-name=""><text:span text:style-name="a427" text:class-names=""><text:tab/></text:span><text:span text:style-name="a428" text:class-names=""><text:tab/><text:tab/>L1IAGE 2026</text:span></text:p>
          </draw:text-box>
          <svg:title/>
          <svg:desc/>
        </draw:frame>
      </draw:page>
      <draw:page draw:name="Slide2" draw:style-name="a431" draw:master-page-name="Master1-Layout7-blank-Vide" presentation:presentation-page-layout-name="Master1-PPL7" draw:id="Slide-257">
        <draw:frame draw:id="id95" draw:style-name="a437" draw:name="ZoneTexte 2" svg:x="1.04717in" svg:y="1.29245in" svg:width="11.15094in" svg:height="3.06296in">
          <draw:text-box>
            <text:p text:style-name="a436" text:class-names="" text:cond-style-name=""><text:span text:style-name="a432" text:class-names="">AFRITALENT est un site de freelance la collaboration entre entreprise et prestataire de services travaillent<text:s text:c="1"/></text:span><text:span text:style-name="a433" text:class-names="">quellques</text:span><text:span text:style-name="a434" text:class-names=""><text:s text:c="1"/>soit l’endroit ou la disponibilité des parties</text:span><text:span text:style-name="a435" text:class-names=""/></text:p>
          </draw:text-box>
          <svg:title/>
          <svg:desc/>
        </draw:frame>
      </draw:page>
      <draw:page draw:name="Slide3" draw:style-name="a438" draw:master-page-name="Master1-Layout7-blank-Vide" presentation:presentation-page-layout-name="Master1-PPL7" draw:id="Slide-258">
        <draw:frame draw:id="id96" draw:style-name="a454" draw:name="ZoneTexte 1" svg:x="0.98113in" svg:y="1.38679in" svg:width="10.74528in" svg:height="2.861in">
          <draw:text-box>
            <text:p text:style-name="a441" text:class-names="" text:cond-style-name=""><text:span text:style-name="a439" text:class-names=""><text:tab/><text:tab/><text:tab/></text:span><text:span text:style-name="a440" text:class-names="">OBJECTIF DU PROJET</text:span></text:p>
            <text:p text:style-name="a443" text:class-names="" text:cond-style-name=""><text:span text:style-name="a442" text:class-names=""/></text:p>
            <text:p text:style-name="a445" text:class-names="" text:cond-style-name=""><text:span text:style-name="a444" text:class-names=""/></text:p>
            <text:p text:style-name="a453" text:class-names="" text:cond-style-name=""><text:span text:style-name="a446" text:class-names="">Dans le contexte du monde numérique ou tout un chacun est régulièrement en ligne à la recherche de services. C’est dans ce but que<text:s text:c="1"/></text:span><text:span text:style-name="a447" text:class-names="">AfriTalent</text:span><text:span text:style-name="a448" text:class-names=""><text:s text:c="1"/></text:span><text:span text:style-name="a449" text:class-names="">naissa</text:span><text:span text:style-name="a450" text:class-names="">, une plateforme de freelance ou employeur et employé se rencontre à la recherche de collaborateur expert dans son domaine</text:span><text:span text:style-name="a451" text:class-names="">.</text:span><text:span text:style-name="a452" text:class-names=""/></text:p>
          </draw:text-box>
          <svg:title/>
          <svg:desc/>
        </draw:frame>
      </draw:page>
      <draw:page draw:name="Slide4" draw:style-name="a455" draw:master-page-name="Master1-Layout7-blank-Vide" presentation:presentation-page-layout-name="Master1-PPL7" draw:id="Slide-259">
        <draw:frame draw:id="id97" draw:style-name="a472" draw:name="ZoneTexte 2" svg:x="1.16981in" svg:y="1.0566in" svg:width="10.92453in" svg:height="5.25078in">
          <draw:text-box>
            <text:p text:style-name="a458" text:class-names="" text:cond-style-name=""><text:span text:style-name="a456" text:class-names=""><text:tab/><text:tab/><text:tab/></text:span><text:span text:style-name="a457" text:class-names="">Technologie utilisée</text:span></text:p>
            <text:p text:style-name="a460" text:class-names="" text:cond-style-name=""><text:span text:style-name="a459" text:class-names=""/></text:p>
            <text:p text:style-name="a462" text:class-names="" text:cond-style-name=""><text:span text:style-name="a461" text:class-names=""/></text:p>
            <text:p text:style-name="a464" text:class-names="" text:cond-style-name=""><text:span text:style-name="a463" text:class-names=""/></text:p>
            <text:p text:style-name="a466" text:class-names="" text:cond-style-name=""><text:span text:style-name="a465" text:class-names="">Pour la réalisation de ce site on a due recourir à du html pour la structure complète des pages.</text:span></text:p>
            <text:p text:style-name="a468" text:class-names="" text:cond-style-name=""><text:span text:style-name="a467" text:class-names="">Du css pour les différentes styles de couleur, de typographie …</text:span></text:p>
            <text:p text:style-name="a471" text:class-names="" text:cond-style-name=""><text:span text:style-name="a469" text:class-names="">Du JavaScript qui est l’élément très sollicité dans le dynamisme du site</text:span><text:span text:style-name="a470" text:class-names=""/></text:p>
          </draw:text-box>
          <svg:title/>
          <svg:desc/>
        </draw:frame>
      </draw:page>
      <draw:page draw:name="Slide5" draw:style-name="a473" draw:master-page-name="Master1-Layout7-blank-Vide" presentation:presentation-page-layout-name="Master1-PPL7" draw:id="Slide-260">
        <draw:frame draw:id="id98" draw:style-name="a486" draw:name="ZoneTexte 1" svg:x="1.14151in" svg:y="1.17925in" svg:width="11.00943in" svg:height="2.861in">
          <draw:text-box>
            <text:p text:style-name="a476" text:class-names="" text:cond-style-name=""><text:span text:style-name="a474" text:class-names=""><text:tab/><text:tab/><text:tab/><text:tab/></text:span><text:span text:style-name="a475" text:class-names="">CHOIX DE DESIGN</text:span></text:p>
            <text:p text:style-name="a478" text:class-names="" text:cond-style-name=""><text:span text:style-name="a477" text:class-names=""/></text:p>
            <text:p text:style-name="a480" text:class-names="" text:cond-style-name=""><text:span text:style-name="a479" text:class-names=""/></text:p>
            <text:p text:style-name="a485" text:class-names="" text:cond-style-name=""><text:span text:style-name="a481" text:class-names="">Pour la police j’ai due choisir Arial sans shérif pour sa lisibilité à l’</text:span><text:span text:style-name="a482" text:class-names="">é</text:span><text:span text:style-name="a483" text:class-names="">cran accompagné de la couleur qui renforce la vue</text:span><text:span text:style-name="a484" text:class-names=""/></text:p>
          </draw:text-box>
          <svg:title/>
          <svg:desc/>
        </draw:frame>
      </draw:page>
      <draw:page draw:name="Slide6" draw:style-name="a487" draw:master-page-name="Master1-Layout7-blank-Vide" presentation:presentation-page-layout-name="Master1-PPL7" draw:id="Slide-261">
        <draw:frame draw:id="id99" draw:style-name="a528" draw:name="ZoneTexte 1" svg:x="0.75472in" svg:y="0.30189in" svg:width="11.00943in" svg:height="6.49616in">
          <draw:text-box>
            <text:p text:style-name="a489" text:class-names="" text:cond-style-name=""><text:span text:style-name="a488" text:class-names=""><text:tab/><text:tab/><text:tab/>Arborescence<text:s text:c="1"/></text:span></text:p>
            <text:p text:style-name="a491" text:class-names="" text:cond-style-name=""><text:span text:style-name="a490" text:class-names="">|___ index.html</text:span></text:p>
            <text:p text:style-name="a493" text:class-names="" text:cond-style-name=""><text:span text:style-name="a492" text:class-names="">|___ freelances.html</text:span></text:p>
            <text:p text:style-name="a495" text:class-names="" text:cond-style-name=""><text:span text:style-name="a494" text:class-names="">|___ tarifs.html</text:span></text:p>
            <text:p text:style-name="a497" text:class-names="" text:cond-style-name=""><text:span text:style-name="a496" text:class-names="">|___ about.html</text:span></text:p>
            <text:p text:style-name="a499" text:class-names="" text:cond-style-name=""><text:span text:style-name="a498" text:class-names="">|___ contact.html</text:span></text:p>
            <text:p text:style-name="a501" text:class-names="" text:cond-style-name=""><text:span text:style-name="a500" text:class-names="">|___ CSS/</text:span></text:p>
            <text:p text:style-name="a503" text:class-names="" text:cond-style-name=""><text:span text:style-name="a502" text:class-names="">    |____style.css</text:span></text:p>
            <text:p text:style-name="a505" text:class-names="" text:cond-style-name=""><text:span text:style-name="a504" text:class-names=""><text:line-break/>|___ JS/</text:span></text:p>
            <text:p text:style-name="a507" text:class-names="" text:cond-style-name=""><text:span text:style-name="a506" text:class-names="">    |____main.js</text:span></text:p>
            <text:p text:style-name="a509" text:class-names="" text:cond-style-name=""><text:span text:style-name="a508" text:class-names=""><text:line-break/>|___ Images/</text:span></text:p>
            <text:p text:style-name="a513" text:class-names="" text:cond-style-name=""><text:span text:style-name="a510" text:class-names="">    |</text:span><text:span text:style-name="a511" text:class-names="">__</text:span><text:span text:style-name="a512" text:class-names="">__(images utilisées dans les fichiers html)</text:span></text:p>
            <text:p text:style-name="a515" text:class-names="" text:cond-style-name=""><text:span text:style-name="a514" text:class-names=""><text:line-break/>___docs/</text:span></text:p>
            <text:p text:style-name="a519" text:class-names="" text:cond-style-name=""><text:span text:style-name="a516" text:class-names="">    |__</text:span><text:span text:style-name="a517" text:class-names="">Samba_Sylla_Presentation</text:span><text:span text:style-name="a518" text:class-names=""/></text:p>
            <text:p text:style-name="a521" text:class-names="" text:cond-style-name=""><text:span text:style-name="a520" text:class-names=""><text:line-break/>|___README.md</text:span></text:p>
            <text:p text:style-name="a525" text:class-names="" text:cond-style-name=""><text:span text:style-name="a522" text:class-names="">|___.</text:span><text:span text:style-name="a523" text:class-names="">gitignore</text:span><text:span text:style-name="a524" text:class-names=""/></text:p>
            <text:p text:style-name="a527" text:class-names="" text:cond-style-name=""><text:span text:style-name="a526" text:class-names=""/></text:p>
          </draw:text-box>
          <svg:title/>
          <svg:desc/>
        </draw:frame>
      </draw:page>
      <draw:page draw:name="Slide7" draw:style-name="a529" draw:master-page-name="Master1-Layout7-blank-Vide" presentation:presentation-page-layout-name="Master1-PPL7" draw:id="Slide-262">
        <draw:frame draw:id="id100" draw:style-name="a570" draw:name="ZoneTexte 1" svg:x="0.75472in" svg:y="0.30189in" svg:width="11.00943in" svg:height="6.49616in">
          <draw:text-box>
            <text:p text:style-name="a531" text:class-names="" text:cond-style-name=""><text:span text:style-name="a530" text:class-names=""><text:tab/><text:tab/><text:tab/>Arborescence<text:s text:c="1"/></text:span></text:p>
            <text:p text:style-name="a533" text:class-names="" text:cond-style-name=""><text:span text:style-name="a532" text:class-names="">|___ index.html</text:span></text:p>
            <text:p text:style-name="a535" text:class-names="" text:cond-style-name=""><text:span text:style-name="a534" text:class-names="">|___ freelances.html</text:span></text:p>
            <text:p text:style-name="a537" text:class-names="" text:cond-style-name=""><text:span text:style-name="a536" text:class-names="">|___ tarifs.html</text:span></text:p>
            <text:p text:style-name="a539" text:class-names="" text:cond-style-name=""><text:span text:style-name="a538" text:class-names="">|___ about.html</text:span></text:p>
            <text:p text:style-name="a541" text:class-names="" text:cond-style-name=""><text:span text:style-name="a540" text:class-names="">|___ contact.html</text:span></text:p>
            <text:p text:style-name="a543" text:class-names="" text:cond-style-name=""><text:span text:style-name="a542" text:class-names="">|___ CSS/</text:span></text:p>
            <text:p text:style-name="a545" text:class-names="" text:cond-style-name=""><text:span text:style-name="a544" text:class-names="">    |____style.css</text:span></text:p>
            <text:p text:style-name="a547" text:class-names="" text:cond-style-name=""><text:span text:style-name="a546" text:class-names=""><text:line-break/>|___ JS/</text:span></text:p>
            <text:p text:style-name="a549" text:class-names="" text:cond-style-name=""><text:span text:style-name="a548" text:class-names="">    |____main.js</text:span></text:p>
            <text:p text:style-name="a551" text:class-names="" text:cond-style-name=""><text:span text:style-name="a550" text:class-names=""><text:line-break/>|___ Images/</text:span></text:p>
            <text:p text:style-name="a555" text:class-names="" text:cond-style-name=""><text:span text:style-name="a552" text:class-names="">    |</text:span><text:span text:style-name="a553" text:class-names="">__</text:span><text:span text:style-name="a554" text:class-names="">__(images utilisées dans les fichiers html)</text:span></text:p>
            <text:p text:style-name="a557" text:class-names="" text:cond-style-name=""><text:span text:style-name="a556" text:class-names=""><text:line-break/>___docs/</text:span></text:p>
            <text:p text:style-name="a561" text:class-names="" text:cond-style-name=""><text:span text:style-name="a558" text:class-names="">    |__</text:span><text:span text:style-name="a559" text:class-names="">Samba_Sylla_Presentation</text:span><text:span text:style-name="a560" text:class-names=""/></text:p>
            <text:p text:style-name="a563" text:class-names="" text:cond-style-name=""><text:span text:style-name="a562" text:class-names=""><text:line-break/>|___README.md</text:span></text:p>
            <text:p text:style-name="a567" text:class-names="" text:cond-style-name=""><text:span text:style-name="a564" text:class-names="">|___.</text:span><text:span text:style-name="a565" text:class-names="">gitignore</text:span><text:span text:style-name="a566" text:class-names=""/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8" draw:style-name="a571" draw:master-page-name="Master1-Layout7-blank-Vide" presentation:presentation-page-layout-name="Master1-PPL7" draw:id="Slide-263">
        <draw:frame draw:id="id101" draw:style-name="a572" draw:name="Image 2" svg:x="0.36688in" svg:y="2.19163in" svg:width="4.99534in" svg:height="2.3461in" style:rel-width="scale" style:rel-height="scale">
          <draw:image xlink:href="media/image1.png" xlink:type="simple" xlink:show="embed" xlink:actuate="onLoad"/>
          <svg:title/>
          <svg:desc/>
        </draw:frame>
        <draw:frame draw:id="id102" draw:style-name="a573" draw:name="Image 3" svg:x="6.50943in" svg:y="2.19163in" svg:width="5.87376in" svg:height="2.25957in" style:rel-width="scale" style:rel-height="scale">
          <draw:image xlink:href="media/image2.png" xlink:type="simple" xlink:show="embed" xlink:actuate="onLoad"/>
          <svg:title/>
          <svg:desc/>
        </draw:frame>
        <draw:frame draw:id="id103" draw:style-name="a577" draw:name="ZoneTexte 4" svg:x="1.67924in" svg:y="0.54717in" svg:width="7.4434in" svg:height="0.63952in">
          <draw:text-box>
            <text:p text:style-name="a576" text:class-names="" text:cond-style-name=""><text:span text:style-name="a574" text:class-names=""><text:tab/><text:tab/>Capture d’écran des pages</text:span><text:span text:style-name="a575" text:class-names=""/></text:p>
          </draw:text-box>
          <svg:title/>
          <svg:desc/>
        </draw:frame>
        <draw:frame draw:id="id104" draw:style-name="a578" draw:name="Image 5" svg:x="1.92453in" svg:y="4.74528in" svg:width="8.83019in" svg:height="2.0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579" draw:master-page-name="Master1-Layout7-blank-Vide" presentation:presentation-page-layout-name="Master1-PPL7" draw:id="Slide-264">
        <draw:frame draw:id="id105" draw:style-name="a630" draw:name="ZoneTexte 1" svg:x="1.07547in" svg:y="0.79245in" svg:width="11.83962in" svg:height="6.22689in">
          <draw:text-box>
            <text:p text:style-name="a581" text:class-names="" text:cond-style-name=""><text:span text:style-name="a580" text:class-names=""><text:tab/><text:tab/><text:tab/>Points techniques</text:span></text:p>
            <text:p text:style-name="a583" text:class-names="" text:cond-style-name=""><text:span text:style-name="a582" text:class-names=""/></text:p>
            <text:p text:style-name="a585" text:class-names="" text:cond-style-name=""><text:span text:style-name="a584" text:class-names=""/></text:p>
            <text:p text:style-name="a587" text:class-names="" text:cond-style-name=""><text:span text:style-name="a586" text:class-names="">const btnTop = document.getElementById("btnTop");</text:span></text:p>
            <text:p text:style-name="a589" text:class-names="" text:cond-style-name=""><text:span text:style-name="a588" text:class-names=""><text:line-break/>    // Afficher ou cacher le bouton selon le scroll</text:span></text:p>
            <text:p text:style-name="a591" text:class-names="" text:cond-style-name=""><text:span text:style-name="a590" text:class-names="">    window.addEventListener("scroll", () =&gt; {</text:span></text:p>
            <text:p text:style-name="a593" text:class-names="" text:cond-style-name=""><text:span text:style-name="a592" text:class-names="">      if (window.scrollY &gt; 200) {</text:span></text:p>
            <text:p text:style-name="a595" text:class-names="" text:cond-style-name=""><text:span text:style-name="a594" text:class-names="">        btnTop.style.display = "block";</text:span></text:p>
            <text:p text:style-name="a597" text:class-names="" text:cond-style-name=""><text:span text:style-name="a596" text:class-names="">      } else {</text:span></text:p>
            <text:p text:style-name="a599" text:class-names="" text:cond-style-name=""><text:span text:style-name="a598" text:class-names="">        // display: none  le bouton est invisible au départ.</text:span></text:p>
            <text:p text:style-name="a601" text:class-names="" text:cond-style-name=""><text:span text:style-name="a600" text:class-names="">        btnTop.style.display = "none";</text:span></text:p>
            <text:p text:style-name="a603" text:class-names="" text:cond-style-name=""><text:span text:style-name="a602" text:class-names="">      }</text:span></text:p>
            <text:p text:style-name="a605" text:class-names="" text:cond-style-name=""><text:span text:style-name="a604" text:class-names="">    });</text:span></text:p>
            <text:p text:style-name="a607" text:class-names="" text:cond-style-name=""><text:span text:style-name="a606" text:class-names=""><text:line-break/>    // Action du bouton : remonter en haut</text:span></text:p>
            <text:p text:style-name="a609" text:class-names="" text:cond-style-name=""><text:span text:style-name="a608" text:class-names="">    btnTop.addEventListener("click", () =&gt; {</text:span></text:p>
            <text:p text:style-name="a617" text:class-names="" text:cond-style-name=""><text:span text:style-name="a610" text:class-names="">      // window au lieu document car<text:s text:c="1"/></text:span><text:span text:style-name="a611" text:class-names="">l‘</text:span><text:span text:style-name="a612" text:class-names="">évenement</text:span><text:span text:style-name="a613" text:class-names=""><text:s text:c="1"/>concerne<text:s text:c="1"/></text:span><text:span text:style-name="a614" text:class-names="">la<text:s text:c="1"/></text:span><text:span text:style-name="a615" text:class-names="">fenêtre<text:s text:c="1"/></text:span><text:span text:style-name="a616" text:class-names="">du navigateur<text:s text:c="1"/></text:span></text:p>
            <text:p text:style-name="a619" text:class-names="" text:cond-style-name=""><text:span text:style-name="a618" text:class-names="">      window.scrollTo({</text:span></text:p>
            <text:p text:style-name="a621" text:class-names="" text:cond-style-name=""><text:span text:style-name="a620" text:class-names="">        top: 0,</text:span></text:p>
            <text:p text:style-name="a623" text:class-names="" text:cond-style-name=""><text:span text:style-name="a622" text:class-names="">        behavior: "smooth" // défilement fluide</text:span></text:p>
            <text:p text:style-name="a625" text:class-names="" text:cond-style-name=""><text:span text:style-name="a624" text:class-names="">      });</text:span></text:p>
            <text:p text:style-name="a627" text:class-names="" text:cond-style-name=""><text:span text:style-name="a626" text:class-names="">    });</text:span></text:p>
            <text:p text:style-name="a629" text:class-names="" text:cond-style-name=""><text:span text:style-name="a628" text:class-names=""/></text:p>
          </draw:text-box>
          <svg:title/>
          <svg:desc/>
        </draw:frame>
      </draw:page>
      <draw:page draw:name="Slide10" draw:style-name="a631" draw:master-page-name="Master1-Layout7-blank-Vide" presentation:presentation-page-layout-name="Master1-PPL7" draw:id="Slide-265">
        <draw:frame draw:id="id106" draw:style-name="a704" draw:name="ZoneTexte 1" svg:x="1.07547in" svg:y="0.79245in" svg:width="11.83962in" svg:height="5.3181in">
          <draw:text-box>
            <text:p text:style-name="a633" text:class-names="" text:cond-style-name=""><text:span text:style-name="a632" text:class-names="">.fade-in {</text:span></text:p>
            <text:p text:style-name="a637" text:class-names="" text:cond-style-name=""><text:span text:style-name="a634" text:class-names=""> <text:s text:c="1"/></text:span><text:span text:style-name="a635" text:class-names="">opacity</text:span><text:span text:style-name="a636" text:class-names="">: 0;                /* invisible au départ */</text:span></text:p>
            <text:p text:style-name="a643" text:class-names="" text:cond-style-name=""><text:span text:style-name="a638" text:class-names=""> <text:s text:c="1"/></text:span><text:span text:style-name="a639" text:class-names="">transform</text:span><text:span text:style-name="a640" text:class-names="">:<text:s text:c="1"/></text:span><text:span text:style-name="a641" text:class-names="">translateY</text:span><text:span text:style-name="a642" text:class-names="">(50px); /* décalé vers le bas */</text:span></text:p>
            <text:p text:style-name="a653" text:class-names="" text:cond-style-name=""><text:span text:style-name="a644" text:class-names="">  transition:<text:s text:c="1"/></text:span><text:span text:style-name="a645" text:class-names="">opacity</text:span><text:span text:style-name="a646" text:class-names=""><text:s text:c="1"/>1.5s<text:s text:c="1"/></text:span><text:span text:style-name="a647" text:class-names="">ease</text:span><text:span text:style-name="a648" text:class-names="">,<text:s text:c="1"/></text:span><text:span text:style-name="a649" text:class-names="">transform</text:span><text:span text:style-name="a650" text:class-names=""><text:s text:c="1"/>1.5s<text:s text:c="1"/></text:span><text:span text:style-name="a651" text:class-names="">ease</text:span><text:span text:style-name="a652" text:class-names="">;</text:span></text:p>
            <text:p text:style-name="a655" text:class-names="" text:cond-style-name=""><text:span text:style-name="a654" text:class-names="">  font-size: 24px;</text:span></text:p>
            <text:p text:style-name="a659" text:class-names="" text:cond-style-name=""><text:span text:style-name="a656" text:class-names=""> <text:s text:c="1"/></text:span><text:span text:style-name="a657" text:class-names="">text-align</text:span><text:span text:style-name="a658" text:class-names="">: center;</text:span></text:p>
            <text:p text:style-name="a663" text:class-names="" text:cond-style-name=""><text:span text:style-name="a660" text:class-names=""> <text:s text:c="1"/></text:span><text:span text:style-name="a661" text:class-names="">margin</text:span><text:span text:style-name="a662" text:class-names="">: 100px auto;</text:span></text:p>
            <text:p text:style-name="a667" text:class-names="" text:cond-style-name=""><text:span text:style-name="a664" text:class-names=""> <text:s text:c="1"/></text:span><text:span text:style-name="a665" text:class-names="">width</text:span><text:span text:style-name="a666" text:class-names="">: 80%;</text:span></text:p>
            <text:p text:style-name="a671" text:class-names="" text:cond-style-name=""><text:span text:style-name="a668" text:class-names="">  /* background: #</text:span><text:span text:style-name="a669" text:class-names="">fff</text:span><text:span text:style-name="a670" text:class-names="">; */</text:span></text:p>
            <text:p text:style-name="a675" text:class-names="" text:cond-style-name=""><text:span text:style-name="a672" text:class-names=""> <text:s text:c="1"/></text:span><text:span text:style-name="a673" text:class-names="">padding</text:span><text:span text:style-name="a674" text:class-names="">: 20px;</text:span></text:p>
            <text:p text:style-name="a677" text:class-names="" text:cond-style-name=""><text:span text:style-name="a676" text:class-names="">  border-radius: 8px;</text:span></text:p>
            <text:p text:style-name="a683" text:class-names="" text:cond-style-name=""><text:span text:style-name="a678" text:class-names="">  box-</text:span><text:span text:style-name="a679" text:class-names="">shadow</text:span><text:span text:style-name="a680" text:class-names="">: 0 4px 10px<text:s text:c="1"/></text:span><text:span text:style-name="a681" text:class-names="">rgba</text:span><text:span text:style-name="a682" text:class-names="">(0,0,0,0.1);</text:span></text:p>
            <text:p text:style-name="a685" text:class-names="" text:cond-style-name=""><text:span text:style-name="a684" text:class-names="">}</text:span></text:p>
            <text:p text:style-name="a689" text:class-names="" text:cond-style-name=""><text:span text:style-name="a686" text:class-names=""><text:line-break/>.</text:span><text:span text:style-name="a687" text:class-names="">fade-in.visible</text:span><text:span text:style-name="a688" text:class-names=""><text:s text:c="1"/>{</text:span></text:p>
            <text:p text:style-name="a693" text:class-names="" text:cond-style-name=""><text:span text:style-name="a690" text:class-names=""> <text:s text:c="1"/></text:span><text:span text:style-name="a691" text:class-names="">opacity</text:span><text:span text:style-name="a692" text:class-names="">: 1;                /* devient visible */</text:span></text:p>
            <text:p text:style-name="a699" text:class-names="" text:cond-style-name=""><text:span text:style-name="a694" text:class-names=""> <text:s text:c="1"/></text:span><text:span text:style-name="a695" text:class-names="">transform</text:span><text:span text:style-name="a696" text:class-names="">:<text:s text:c="1"/></text:span><text:span text:style-name="a697" text:class-names="">translateY</text:span><text:span text:style-name="a698" text:class-names="">(0);  /* remonte à sa position normale */</text:span></text:p>
            <text:p text:style-name="a701" text:class-names="" text:cond-style-name=""><text:span text:style-name="a700" text:class-names="">}</text:span></text:p>
            <text:p text:style-name="a703" text:class-names="" text:cond-style-name=""><text:span text:style-name="a702" text:class-names=""/></text:p>
          </draw:text-box>
          <svg:title/>
          <svg:desc/>
        </draw:frame>
      </draw:page>
      <draw:page draw:name="Slide11" draw:style-name="a705" draw:master-page-name="Master1-Layout7-blank-Vide" presentation:presentation-page-layout-name="Master1-PPL7" draw:id="Slide-266">
        <draw:frame draw:id="id107" draw:style-name="a731" draw:name="ZoneTexte 1" svg:x="1.35849in" svg:y="0.81132in" svg:width="11.83962in" svg:height="4.67858in">
          <draw:text-box>
            <text:p text:style-name="a707" text:class-names="" text:cond-style-name=""><text:span text:style-name="a706" text:class-names=""><text:tab/><text:tab/><text:tab/>Historique Github</text:span></text:p>
            <text:p text:style-name="a709" text:class-names="" text:cond-style-name=""><text:span text:style-name="a708" text:class-names=""/></text:p>
            <text:p text:style-name="a711" text:class-names="" text:cond-style-name=""><text:span text:style-name="a710" text:class-names="">Commit 1: initialisation, création de dépôt, arborescence des fichiers et structure HTML de base</text:span></text:p>
            <text:p text:style-name="a713" text:class-names="" text:cond-style-name=""><text:span text:style-name="a712" text:class-names="">Commit 2: HTML: structure complète des 5 pages avec sections et avec texte</text:span></text:p>
            <text:p text:style-name="a715" text:class-names="" text:cond-style-name=""><text:span text:style-name="a714" text:class-names="">Commit 3 : CSS, Variable, Typographie, layout général et style de base</text:span></text:p>
            <text:p text:style-name="a717" text:class-names="" text:cond-style-name=""><text:span text:style-name="a716" text:class-names="">Commit 4: Bento Grid, sections hero et catégories, effets hover</text:span></text:p>
            <text:p text:style-name="a719" text:class-names="" text:cond-style-name=""><text:span text:style-name="a718" text:class-names="">Commit 5: CSS, responsive design mobile et tablette, media queries</text:span></text:p>
            <text:p text:style-name="a721" text:class-names="" text:cond-style-name=""><text:span text:style-name="a720" text:class-names="">Commit 6: JS, dark mode avec localStorage, navbar dynamique au scroll</text:span></text:p>
            <text:p text:style-name="a723" text:class-names="" text:cond-style-name=""><text:span text:style-name="a722" text:class-names="">Commit 7: JS, compteur animé au scroll et animations fade-in des sections</text:span></text:p>
            <text:p text:style-name="a725" text:class-names="" text:cond-style-name=""><text:span text:style-name="a724" text:class-names="">Commit 8: JS, filtrage dynamique des freelances et validation du formulaire de contact</text:span></text:p>
            <text:p text:style-name="a727" text:class-names="" text:cond-style-name=""><text:span text:style-name="a726" text:class-names="">Commit 9: finalisation, corrections responsives, optimisation du code et commentaires</text:span></text:p>
            <text:p text:style-name="a730" text:class-names="" text:cond-style-name=""><text:span text:style-name="a728" text:class-names="">Commit 10: Déploiement, Github Pages active, README finalisé et présentation PowerPoint</text:span><text:span text:style-name="a729" text:class-names=""/></text:p>
          </draw:text-box>
          <svg:title/>
          <svg:desc/>
        </draw:frame>
      </draw:page>
      <draw:page draw:name="Slide12" draw:style-name="a732" draw:master-page-name="Master1-Layout7-blank-Vide" presentation:presentation-page-layout-name="Master1-PPL7" draw:id="Slide-267">
        <draw:frame draw:id="id108" draw:style-name="a746" draw:name="ZoneTexte 1" svg:x="1.35849in" svg:y="0.81132in" svg:width="11.83962in" svg:height="2.861in">
          <draw:text-box>
            <text:p text:style-name="a734" text:class-names="" text:cond-style-name=""><text:span text:style-name="a733" text:class-names=""><text:tab/><text:tab/>La documentation et Ressource</text:span></text:p>
            <text:p text:style-name="a736" text:class-names="" text:cond-style-name=""><text:span text:style-name="a735" text:class-names=""/></text:p>
            <text:p text:style-name="a740" text:class-names="" text:cond-style-name=""><text:span text:style-name="a737" text:class-names="">Durant le développement sur certains points du<text:s text:c="1"/></text:span><text:span text:style-name="a738" text:class-names="">Bootstrap</text:span><text:span text:style-name="a739" text:class-names=""><text:s text:c="1"/>je me suis renseigné sur sa page<text:s text:c="1"/></text:span></text:p>
            <text:p text:style-name="a745" text:class-names="" text:cond-style-name=""><text:span text:style-name="a741" text:class-names="">Officielle sur le comment sert et utilisé certains de ces classes et du contenu<text:s text:c="1"/></text:span><text:span text:style-name="a742" text:class-names="">Youtube</text:span><text:span text:style-name="a743" text:class-names=""><text:s text:c="1"/>pour la documentation du JS</text:span><text:span text:style-name="a744" text:class-names=""/></text:p>
          </draw:text-box>
          <svg:title/>
          <svg:desc/>
        </draw:frame>
      </draw:page>
      <draw:page draw:name="Slide14" draw:style-name="a747" draw:master-page-name="Master1-Layout7-blank-Vide" presentation:presentation-page-layout-name="Master1-PPL7" draw:id="Slide-269">
        <draw:frame draw:id="id109" draw:style-name="a758" draw:name="ZoneTexte 1" svg:x="1.35849in" svg:y="0.81132in" svg:width="11.83962in" svg:height="2.05319in">
          <draw:text-box>
            <text:p text:style-name="a749" text:class-names="" text:cond-style-name=""><text:span text:style-name="a748" text:class-names=""><text:tab/><text:tab/><text:tab/>Lien accessible du site</text:span></text:p>
            <text:p text:style-name="a751" text:class-names="" text:cond-style-name=""><text:span text:style-name="a750" text:class-names=""/></text:p>
            <text:p text:style-name="a753" text:class-names="" text:cond-style-name=""><text:span text:style-name="a752" text:class-names=""/></text:p>
            <text:p text:style-name="a757" text:class-names="" text:cond-style-name=""><text:span text:style-name="a754" text:class-names=""> </text:span><text:span text:style-name="a755" text:class-names=""><text:a xlink:href="https://bathiosse331.github.io/Samba-Sylla-AfriTalent/" text:style-name="" text:visited-style-name="">https://bathiosse331.github.io/Samba-Sylla-AfriTalent/</text:a></text:span><text:span text:style-name="a756" text:class-names=""/></text:p>
          </draw:text-box>
          <svg:title/>
          <svg:desc/>
        </draw:frame>
      </draw:page>
      <draw:page draw:name="Slide13" draw:style-name="a759" draw:master-page-name="Master1-Layout7-blank-Vide" presentation:presentation-page-layout-name="Master1-PPL7" draw:id="Slide-268">
        <draw:frame draw:id="id110" draw:style-name="a776" draw:name="ZoneTexte 1" svg:x="1.35849in" svg:y="0.81132in" svg:width="11.83962in" svg:height="2.72637in">
          <draw:text-box>
            <text:p text:style-name="a761" text:class-names="" text:cond-style-name=""><text:span text:style-name="a760" text:class-names=""><text:tab/><text:tab/>Conclusion et perspective d’amélioration</text:span></text:p>
            <text:p text:style-name="a763" text:class-names="" text:cond-style-name=""><text:span text:style-name="a762" text:class-names=""/></text:p>
            <text:p text:style-name="a765" text:class-names="" text:cond-style-name=""><text:span text:style-name="a764" text:class-names=""/></text:p>
            <text:p text:style-name="a767" text:class-names="" text:cond-style-name=""><text:span text:style-name="a766" text:class-names="">Ce projet est riche, il nous permet de se dépasser sur le notre niveau d’étude et autres…</text:span></text:p>
            <text:p text:style-name="a769" text:class-names="" text:cond-style-name=""><text:span text:style-name="a768" text:class-names=""/></text:p>
            <text:p text:style-name="a771" text:class-names="" text:cond-style-name=""><text:span text:style-name="a770" text:class-names="">Une perspective doit être prise en charge pour l’amélioration technique du site avec des effets</text:span></text:p>
            <text:p text:style-name="a775" text:class-names="" text:cond-style-name=""><text:span text:style-name="a772" text:class-names="">Permettants</text:span><text:span text:style-name="a773" text:class-names=""><text:s text:c="1"/>de stocker par exemple les informations du formulaire de contact…<text:s text:c="1"/></text:span><text:span text:style-name="a774" text:class-names=""/></text:p>
          </draw:text-box>
          <svg:title/>
          <svg:desc/>
        </draw:frame>
      </draw:page>
      <draw:page draw:name="Slide15" draw:style-name="a777" draw:master-page-name="Master1-Layout7-blank-Vide" presentation:presentation-page-layout-name="Master1-PPL7" draw:id="Slide-270">
        <draw:frame draw:id="id111" draw:style-name="a792" draw:name="ZoneTexte 2" svg:x="1.29245in" svg:y="4.06604in" svg:width="10.61321in" svg:height="1.91855in">
          <draw:text-box>
            <text:p text:style-name="a779" text:class-names="" text:cond-style-name=""><text:span text:style-name="a778" text:class-names=""><text:s text:c="1"/></text:span></text:p>
            <text:p text:style-name="a782" text:class-names="" text:cond-style-name=""><text:span text:style-name="a780" text:class-names=""><text:tab/><text:tab/><text:tab/> <text:s text:c="6"/></text:span><text:span text:style-name="a781" text:class-names="">PRESENTATION</text:span></text:p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  <text:p text:style-name="a788" text:class-names="" text:cond-style-name=""><text:span text:style-name="a787" text:class-names=""><text:s text:c="5"/><text:tab/> <text:s text:c="18"/><text:tab/>SAMBA-SYLLA-AFRITALENT<text:s text:c="1"/></text:span></text:p>
            <text:p text:style-name="a791" text:class-names="" text:cond-style-name=""><text:span text:style-name="a789" text:class-names=""><text:tab/><text:tab/><text:tab/> <text:s text:c="11"/>L1IAGE 2026</text:span><text:span text:style-name="a790" text:class-names=""/></text:p>
          </draw:text-box>
          <svg:title/>
          <svg:desc/>
        </draw:frame>
        <draw:frame draw:id="id112" draw:style-name="a796" draw:name="ZoneTexte 3" svg:x="3.66038in" svg:y="1.9717in" svg:width="3.21698in" svg:height="0.63952in">
          <draw:text-box>
            <text:p text:style-name="a795" text:class-names="" text:cond-style-name=""><text:span text:style-name="a793" text:class-names=""><text:tab/>FIN</text:span><text:span text:style-name="a7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93a299" draw:opacity="100%" draw:stroke="solid" svg:stroke-width="0.01736in" svg:stroke-color="#6b766f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none" draw:stroke="solid" svg:stroke-width="0.00694in" svg:stroke-color="#ffffff" svg:stroke-opacity="100%" svg:stroke-linecap="butt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40404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6b7d72" draw:opacity="100%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solid" draw:fill-color="#6b7d72" draw:opacity="100%" draw:stroke="none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solid" draw:fill-color="#93a299" draw:opacity="100%" draw:stroke="non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none" draw:stroke="solid" svg:stroke-width="0.00694in" svg:stroke-color="#ffffff" svg:stroke-opacity="100%" svg:stroke-linecap="butt"/>
    </style:style>
    <style:style style:family="text" style:name="a184">
      <style:text-properties fo:text-transform="uppercase" fo:color="#dfe0b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dfe0b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40404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draw:fill="solid" draw:fill-color="#6b7d72" draw:opacity="100%" draw:stroke="non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draw:fill="solid" draw:fill-color="#93a299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6b7d72" draw:opacity="100%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93a299" draw:opacity="100%" draw:stroke="non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0694in" svg:stroke-color="#ffffff" svg:stroke-opacity="100%" svg:stroke-linecap="butt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93a299" draw:opacity="100%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ecedd1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40404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6b7d72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ffffff" svg:stroke-opacity="100%" svg:stroke-linecap="butt"/>
    </style:style>
    <style:style style:family="drawing-page" style:name="a37">
      <style:drawing-page-properties draw:fill="solid" draw:fill-color="#40404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6b7d72" draw:opacity="100%" draw:stroke="none"/>
    </style:style>
    <style:style style:family="graphic" style:name="a39">
      <style:graphic-properties draw:fill="solid" draw:fill-color="#93a299" draw:opacity="100%" draw:stroke="none"/>
    </style:style>
    <style:style style:family="graphic" style:name="a260">
      <style:graphic-properties draw:fill="solid" draw:fill-color="#93a299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fffff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6b7d72" draw:opacity="100%" draw:stroke="none"/>
    </style:style>
    <style:style style:family="graphic" style:name="a124">
      <style:graphic-properties draw:fill="solid" draw:fill-color="#93a299" draw:opacity="100%" draw:stroke="non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ffffff" svg:stroke-opacity="100%" svg:stroke-linecap="butt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ecedd1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ecedd1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40404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6b7d72" draw:opacity="100%" draw:stroke="none"/>
    </style:style>
    <style:style style:family="graphic" style:name="a275">
      <style:graphic-properties draw:fill="solid" draw:fill-color="#93a299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fffff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6b7d72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93a299" draw:opacity="100%" draw:stroke="none"/>
    </style:style>
    <style:style style:family="text" style:name="a306">
      <style:text-properties fo:text-transform="uppercas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ffffff" svg:stroke-opacity="100%" svg:stroke-linecap="butt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40404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93a299" draw:opacity="100%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2">
      <style:graphic-properties fo:wrap-option="wrap" fo:padding-top="0.5in" fo:padding-bottom="0.05in" fo:padding-left="0.5in" fo:padding-right="0in" draw:textarea-vertical-align="top" draw:textarea-horizontal-align="left" draw:fill="solid" draw:fill-color="#7f7f7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40404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6b7d72" draw:opacity="100%" draw:stroke="none"/>
    </style:style>
    <style:style style:family="graphic" style:name="a2">
      <style:graphic-properties draw:fill="solid" draw:fill-color="#93a299" draw:opacity="100%" draw:stroke="non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40404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ecedd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solid" draw:fill-color="#6b7d72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solid" draw:fill-color="#93a299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385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362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391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b5ae5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b5ae53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b5ae5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b5ae53" fo:font-family="Calibri" style:font-family-generic="swiss" style:font-pitch="variable" fo:font-size="100%"/>
      </text:list-level-style-bullet>
    </text:list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z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Diapositive-de-titr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Modifiez le style des sous-titres du masqu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re-et-contenu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9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Modifiez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Titre-de-section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Modifiez le style du titr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Deux-contenus" style:page-layout-name="pageLayout1" draw:style-name="a122">
      <draw:custom-shape svg:x="0in" svg:y="7in" svg:width="13.33333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Modifiez le style du titr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Modifiez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odifiez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aison" style:page-layout-name="pageLayout1" draw:style-name="a176">
      <draw:custom-shape svg:x="0in" svg:y="7in" svg:width="13.33333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9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Modifiez les styles du texte du masque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Modifiez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Modifiez les styles du texte du masque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Modifiez les styles du texte du masque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Deuxième niveau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Cinquième niveau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/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re-seul" style:page-layout-name="pageLayout1" draw:style-name="a238">
      <draw:custom-shape svg:x="0in" svg:y="7in" svg:width="13.33333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9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Modifiez le style du titr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Vide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73">
      <draw:custom-shape svg:x="0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Modifiez le style du titr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Modifiez les styles du texte du masque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Deuxième niveau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Cinquième niveau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Image-avec-légende" style:page-layout-name="pageLayout1" draw:style-name="a313">
      <draw:custom-shape svg:x="0.00002in" svg:y="5.37519in" svg:width="13.32986in" svg:height="0.07in" draw:id="id72" draw:style-name="a31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18" draw:name="Title 1" svg:x="1.2in" svg:y="5.55in" svg:width="11.06042in" svg:height="0.9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74" presentation:style-name="a322" draw:name="Picture Placeholder 2" svg:x="0.00002in" svg:y="0in" svg:width="13.33332in" svg:height="5.37519in" presentation:class="graphic" presentation:placeholder="false">
        <draw:text-box>
          <text:p text:style-name="a321" text:class-names="" text:cond-style-name=""><text:span text:style-name="a319" text:class-names="">Cliquez sur l'icône pour ajouter une image</text:span><text:span text:style-name="a320" text:class-names=""/></text:p>
        </draw:text-box>
        <svg:title/>
        <svg:desc/>
      </draw:frame>
      <draw:frame draw:id="id75" presentation:style-name="a326" draw:name="Text Placeholder 3" svg:x="1.2in" svg:y="6.46in" svg:width="11.06in" svg:height="0.65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Modifiez les styles du texte du masque</text:span></text:p>
            </text:list-item>
          </text:list>
        </draw:text-box>
        <svg:title/>
        <svg:desc/>
      </draw:frame>
      <draw:frame draw:id="id76" presentation:style-name="a331" draw:name="Date Placeholder 4" svg:x="1.2in" svg:y="7.06451in" svg:width="2.70371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77" presentation:style-name="a334" draw:name="Footer Placeholder 5" svg:x="4.03126in" svg:y="7.06451in" svg:width="5.27428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8" presentation:style-name="a338" draw:name="Slide Number Placeholder 6" svg:x="10.82727in" svg:y="7.06451in" svg:width="1.43485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39">
      <draw:custom-shape svg:x="0in" svg:y="7in" svg:width="13.33333in" svg:height="0.5in" draw:id="id79" draw:layer="Master1-bg" draw:style-name="a3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80" draw:layer="Master1-bg" draw:style-name="a3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1" draw:layer="Master1-bg" draw:style-name="a342" draw:name="Straight Connector 9">
        <svg:title/>
        <svg:desc/>
      </draw:connector>
      <draw:frame draw:id="id82" presentation:style-name="a346" draw:name="Title 1" svg:x="1.2in" svg:y="0.31343in" svg:width="11in" svg:height="1.58657in" presentation:class="title" presentation:placeholder="false">
        <draw:text-box>
          <text:p text:style-name="a345" text:class-names="" text:cond-style-name=""><text:span text:style-name="a343" text:class-names="">Modifiez le style du titre</text:span><text:span text:style-name="a344" text:class-names=""/></text:p>
        </draw:text-box>
        <svg:title/>
        <svg:desc/>
      </draw:frame>
      <draw:frame draw:id="id83" presentation:style-name="a363" draw:name="Vertical Text Placeholder 2" svg:x="1.2in" svg:y="2.01852in" svg:width="11in" svg:height="4.4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Modifiez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Cinquièm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68" draw:name="Date Placeholder 3" svg:x="1.2in" svg:y="7.06451in" svg:width="2.70371in" svg:height="0.39931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/></text:span><text:span text:style-name="a366" text:class-names=""/></text:p>
        </draw:text-box>
        <svg:title/>
        <svg:desc/>
      </draw:frame>
      <draw:frame draw:id="id85" presentation:style-name="a371" draw:name="Footer Placeholder 4" svg:x="4.03126in" svg:y="7.06451in" svg:width="5.27428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86" presentation:style-name="a375" draw:name="Slide Number Placeholder 5" svg:x="10.82727in" svg:y="7.06451in" svg:width="1.43485in" svg:height="0.39931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76">
      <draw:custom-shape svg:x="0.00347in" svg:y="7in" svg:width="13.32986in" svg:height="0.5in" draw:id="id87" draw:style-name="a37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8" draw:style-name="a37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82" draw:name="Vertical Title 1" svg:x="9.54167in" svg:y="0.4509in" svg:width="2.875in" svg:height="6.2991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90" presentation:style-name="a399" draw:name="Vertical Text Placeholder 2" svg:x="0.91667in" svg:y="0.4509in" svg:width="8.45833in" svg:height="6.2991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Modifiez les styles du texte du masque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Deuxième niveau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Cinquième niveau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4" draw:name="Date Placeholder 3" svg:x="1.2in" svg:y="7.06451in" svg:width="2.70371in" svg:height="0.39931in" presentation:class="date-time" presentation:placeholder="false">
        <draw:text-box>
          <text:p text:style-name="a403" text:class-names="" text:cond-style-name=""><text:span text:style-name="a400" text:class-names=""><text:date text:fixed="false" style:data-style-name="a401"/></text:span><text:span text:style-name="a402" text:class-names=""/></text:p>
        </draw:text-box>
        <svg:title/>
        <svg:desc/>
      </draw:frame>
      <draw:frame draw:id="id92" presentation:style-name="a407" draw:name="Footer Placeholder 4" svg:x="4.03126in" svg:y="7.06451in" svg:width="5.27428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3" presentation:style-name="a411" draw:name="Slide Number Placeholder 5" svg:x="10.82727in" svg:y="7.06451in" svg:width="1.43485in" svg:height="0.39931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ENO NDIOUM</meta:initial-creator>
    <dc:creator>ENO NDIOUM</dc:creator>
    <meta:creation-date>2026-06-16T18:09:24Z</meta:creation-date>
    <dc:date>2026-06-16T22:58:50Z</dc:date>
    <meta:template xlink:href="Retrospect" xlink:type="simple"/>
    <meta:editing-cycles>13</meta:editing-cycles>
    <meta:editing-duration>PT17366S</meta:editing-duration>
    <meta:document-statistic meta:paragraph-count="127" meta:word-count="28"/>
  </office:meta>
</office:document-meta>
</file>